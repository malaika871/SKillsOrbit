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4042in" table:align="left"/>
    </style:style>
    <style:style style:name="Table1.A" style:family="table-column">
      <style:table-column-properties style:column-width="1.1201in"/>
    </style:style>
    <style:style style:name="Table1.B" style:family="table-column">
      <style:table-column-properties style:column-width="2.284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2">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3">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4">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5">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6">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7">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8">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9">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20">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1">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2">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3">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4">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5">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list-style-name="L2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span text:style-name="Strong_20_Emphasis">SKILLORBIT</text:span></text:h>
      <text:h text:style-name="Heading_20_2" text:outline-level="2">Intelligent Career Advisor &amp; Resume Analyzer Using Machine Learning with Simulation Dashboard</text:h>
      <text:p text:style-name="Horizontal_20_Line"/>
      <text:h text:style-name="Heading_20_1" text:outline-level="1">🧾 <text:span text:style-name="Strong_20_Emphasis">1. ABSTRACT</text:span></text:h>
      <text:p text:style-name="Text_20_body">SkillOrbit is a web-based intelligent career guidance system that helps students and job seekers identify suitable career paths based on their skills or resume analysis. The system uses Machine Learning techniques such as text similarity and skill matching to recommend relevant careers.</text:p>
      <text:p text:style-name="Text_20_body">It also includes a simulation dashboard that visually represents real-world career trends such as salary growth, job demand, and automation risk. This makes the system more interactive and helpful for decision-making.</text:p>
      <text:p text:style-name="Text_20_body">The main goal of SkillOrbit is to bridge the gap between academic skills and industry requirements by providing personalized, data-driven career guidance.</text:p>
      <text:p text:style-name="Horizontal_20_Line"/>
      <text:h text:style-name="Heading_20_1" text:outline-level="1">🎯 <text:span text:style-name="Strong_20_Emphasis">2. OBJECTIVES</text:span></text:h>
      <text:p text:style-name="Text_20_body">The objectives of SkillOrbit are:</text:p>
      <text:list text:style-name="L1">
        <text:list-item>
          <text:p text:style-name="P1">To develop an AI-based career recommendation system </text:p>
        </text:list-item>
        <text:list-item>
          <text:p text:style-name="P1">To analyze resumes using NLP techniques </text:p>
        </text:list-item>
        <text:list-item>
          <text:p text:style-name="P1">To identify skill gaps between user and industry requirements </text:p>
        </text:list-item>
        <text:list-item>
          <text:p text:style-name="P1">To recommend suitable career paths </text:p>
        </text:list-item>
        <text:list-item>
          <text:p text:style-name="P1">To generate personalized career roadmaps </text:p>
        </text:list-item>
        <text:list-item>
          <text:p text:style-name="P1">To simulate real-world job market trends </text:p>
        </text:list-item>
        <text:list-item>
          <text:p text:style-name="P2">To improve career decision-making for students </text:p>
        </text:list-item>
      </text:list>
      <text:p text:style-name="Horizontal_20_Line"/>
      <text:h text:style-name="Heading_20_1" text:outline-level="1">📌 <text:span text:style-name="Strong_20_Emphasis">3. PROBLEM STATEMENT</text:span></text:h>
      <text:p text:style-name="Text_20_body">Many students face difficulty in choosing the right career due to lack of guidance and awareness of industry demands. Traditional counseling methods are not personalized and do not consider individual skills or resumes.</text:p>
      <text:p text:style-name="Text_20_body">There is a need for an intelligent system that can:</text:p>
      <text:list text:style-name="L2">
        <text:list-item>
          <text:p text:style-name="P3"><text:soft-page-break/>Automatically analyze skills and resumes </text:p>
        </text:list-item>
        <text:list-item>
          <text:p text:style-name="P3">Recommend relevant career options </text:p>
        </text:list-item>
        <text:list-item>
          <text:p text:style-name="P3">Show future job trends and demand </text:p>
        </text:list-item>
        <text:list-item>
          <text:p text:style-name="P4">Provide structured learning guidance </text:p>
        </text:list-item>
      </text:list>
      <text:p text:style-name="Text_20_body">SkillOrbit solves this problem using Machine Learning and simulation techniques.</text:p>
      <text:p text:style-name="Horizontal_20_Line"/>
      <text:h text:style-name="Heading_20_1" text:outline-level="1">💡 <text:span text:style-name="Strong_20_Emphasis">4. PROPOSED SYSTEM</text:span></text:h>
      <text:p text:style-name="Text_20_body">SkillOrbit provides an intelligent and automated career guidance platform with the following modules:</text:p>
      <text:h text:style-name="Heading_20_3" text:outline-level="3">1️⃣ Career Advisor Module</text:h>
      <text:list text:style-name="L3">
        <text:list-item>
          <text:p text:style-name="P5">Takes user skills as input </text:p>
        </text:list-item>
        <text:list-item>
          <text:p text:style-name="P5">Matches skills with career dataset </text:p>
        </text:list-item>
        <text:list-item>
          <text:p text:style-name="P6">Suggests best career options </text:p>
        </text:list-item>
      </text:list>
      <text:h text:style-name="Heading_20_3" text:outline-level="3">2️⃣ Resume Analyzer Module</text:h>
      <text:list text:style-name="L4">
        <text:list-item>
          <text:p text:style-name="P7">Extracts text from uploaded resume </text:p>
        </text:list-item>
        <text:list-item>
          <text:p text:style-name="P7">Identifies skills using NLP </text:p>
        </text:list-item>
        <text:list-item>
          <text:p text:style-name="P8">Matches resume with career paths </text:p>
        </text:list-item>
      </text:list>
      <text:h text:style-name="Heading_20_3" text:outline-level="3">3️⃣ Skill Gap Analyzer</text:h>
      <text:list text:style-name="L5">
        <text:list-item>
          <text:p text:style-name="P9">Compares user skills with required skills </text:p>
        </text:list-item>
        <text:list-item>
          <text:p text:style-name="P10">Shows missing skills clearly </text:p>
        </text:list-item>
      </text:list>
      <text:h text:style-name="Heading_20_3" text:outline-level="3">4️⃣ Simulation Dashboard</text:h>
      <text:list text:style-name="L6">
        <text:list-item>
          <text:p text:style-name="P11">Displays salary growth trends </text:p>
        </text:list-item>
        <text:list-item>
          <text:p text:style-name="P11">Shows job demand levels </text:p>
        </text:list-item>
        <text:list-item>
          <text:p text:style-name="P11">Represents automation risk </text:p>
        </text:list-item>
        <text:list-item>
          <text:p text:style-name="P12">Visualizes competition levels </text:p>
        </text:list-item>
      </text:list>
      <text:h text:style-name="Heading_20_3" text:outline-level="3">5️⃣ Career Roadmap Generator</text:h>
      <text:list text:style-name="L7">
        <text:list-item>
          <text:p text:style-name="P13">Provides step-by-step learning plan for selected career </text:p>
        </text:list-item>
      </text:list>
      <text:p text:style-name="Horizontal_20_Line"/>
      <text:h text:style-name="Heading_20_1" text:outline-level="1">⚙️ <text:span text:style-name="Strong_20_Emphasis">5. METHODOLOGY</text:span></text:h>
      <text:p text:style-name="Text_20_body">The system follows these steps:</text:p>
      <text:h text:style-name="Heading_20_3" text:outline-level="3"><text:soft-page-break/>Step 1: Data Collection</text:h>
      <text:list text:style-name="L8">
        <text:list-item>
          <text:p text:style-name="P14">Career dataset (skills vs job roles) </text:p>
        </text:list-item>
        <text:list-item>
          <text:p text:style-name="P15">Sample resumes </text:p>
        </text:list-item>
      </text:list>
      <text:h text:style-name="Heading_20_3" text:outline-level="3">Step 2: Data Preprocessing</text:h>
      <text:list text:style-name="L9">
        <text:list-item>
          <text:p text:style-name="P16">Cleaning text data </text:p>
        </text:list-item>
        <text:list-item>
          <text:p text:style-name="P16">Tokenization </text:p>
        </text:list-item>
        <text:list-item>
          <text:p text:style-name="P17">Skill extraction </text:p>
        </text:list-item>
      </text:list>
      <text:h text:style-name="Heading_20_3" text:outline-level="3">Step 3: Machine Learning Model</text:h>
      <text:list text:style-name="L10">
        <text:list-item>
          <text:p text:style-name="P18">TF-IDF Vectorization </text:p>
        </text:list-item>
        <text:list-item>
          <text:p text:style-name="P18">Cosine Similarity matching </text:p>
        </text:list-item>
        <text:list-item>
          <text:p text:style-name="P19">Rule-based fallback classification </text:p>
        </text:list-item>
      </text:list>
      <text:h text:style-name="Heading_20_3" text:outline-level="3">Step 4: Recommendation System</text:h>
      <text:list text:style-name="L11">
        <text:list-item>
          <text:p text:style-name="P20">Matches user profile with careers </text:p>
        </text:list-item>
        <text:list-item>
          <text:p text:style-name="P21">Ranks results based on similarity score </text:p>
        </text:list-item>
      </text:list>
      <text:h text:style-name="Heading_20_3" text:outline-level="3">Step 5: Simulation Layer</text:h>
      <text:list text:style-name="L12">
        <text:list-item>
          <text:p text:style-name="P22">Uses predefined datasets </text:p>
        </text:list-item>
        <text:list-item>
          <text:p text:style-name="P23">Generates graphs for career trends </text:p>
        </text:list-item>
      </text:list>
      <text:p text:style-name="Horizontal_20_Line"/>
      <text:h text:style-name="Heading_20_1" text:outline-level="1">🧠 <text:span text:style-name="Strong_20_Emphasis">6. MACHINE LEARNING TECHNIQUES USED</text:span></text:h>
      <text:list text:style-name="L13">
        <text:list-item>
          <text:p text:style-name="P24">TF-IDF (Text Vectorization) </text:p>
        </text:list-item>
        <text:list-item>
          <text:p text:style-name="P24">Cosine Similarity (Career Matching) </text:p>
        </text:list-item>
        <text:list-item>
          <text:p text:style-name="P24">Keyword Extraction (Skill detection) </text:p>
        </text:list-item>
        <text:list-item>
          <text:p text:style-name="P25">Hybrid Rule-Based Classification </text:p>
        </text:list-item>
      </text:list>
      <text:p text:style-name="Horizontal_20_Line"/>
      <text:h text:style-name="Heading_20_1" text:outline-level="1">📊 <text:span text:style-name="Strong_20_Emphasis">7. SYSTEM DESIGN</text:span></text:h>
      <text:h text:style-name="Heading_20_2" text:outline-level="2">7.1 System Architecture</text:h>
      <text:p text:style-name="Text_20_body">User Interface → Flask Backend → ML Engine → Dataset → Output Dashboard</text:p>
      <text:p text:style-name="Horizontal_20_Line"/>
      <text:h text:style-name="Heading_20_2" text:outline-level="2"><text:soft-page-break/>7.2 Modules</text:h>
      <text:h text:style-name="Heading_20_3" text:outline-level="3">🔹 Frontend</text:h>
      <text:list text:style-name="L14">
        <text:list-item>
          <text:p text:style-name="P26">HTML, CSS, JavaScript </text:p>
        </text:list-item>
        <text:list-item>
          <text:p text:style-name="P27">Interactive dashboards </text:p>
        </text:list-item>
      </text:list>
      <text:h text:style-name="Heading_20_3" text:outline-level="3">🔹 Backend</text:h>
      <text:list text:style-name="L15">
        <text:list-item>
          <text:p text:style-name="P28">Flask (Python) </text:p>
        </text:list-item>
        <text:list-item>
          <text:p text:style-name="P29">API handling </text:p>
        </text:list-item>
      </text:list>
      <text:h text:style-name="Heading_20_3" text:outline-level="3">🔹 ML Engine</text:h>
      <text:list text:style-name="L16">
        <text:list-item>
          <text:p text:style-name="P30">Career recommendation model </text:p>
        </text:list-item>
        <text:list-item>
          <text:p text:style-name="P31">Resume analysis system </text:p>
        </text:list-item>
      </text:list>
      <text:h text:style-name="Heading_20_3" text:outline-level="3">🔹 Visualization Layer</text:h>
      <text:list text:style-name="L17">
        <text:list-item>
          <text:p text:style-name="P32">Chart.js / Matplotlib </text:p>
        </text:list-item>
        <text:list-item>
          <text:p text:style-name="P33">Simulation graphs </text:p>
        </text:list-item>
      </text:list>
      <text:p text:style-name="Horizontal_20_Line"/>
      <text:h text:style-name="Heading_20_1" text:outline-level="1">📂 <text:span text:style-name="Strong_20_Emphasis">8. DATASET DESCRIPTION</text:span></text:h>
      <text:p text:style-name="Text_20_body">SkillOrbit uses a custom dataset containing:</text:p>
      <text:list text:style-name="L18">
        <text:list-item>
          <text:p text:style-name="P34">Career titles </text:p>
        </text:list-item>
        <text:list-item>
          <text:p text:style-name="P34">Required skills </text:p>
        </text:list-item>
        <text:list-item>
          <text:p text:style-name="P34">Salary ranges </text:p>
        </text:list-item>
        <text:list-item>
          <text:p text:style-name="P34">Market demand level </text:p>
        </text:list-item>
        <text:list-item>
          <text:p text:style-name="P35">Job type (Remote / On-site) </text:p>
        </text:list-item>
      </text:list>
      <text:h text:style-name="Heading_20_3" text:outline-level="3">Example:</text:h>
      <table:table table:name="Table1" table:style-name="Table1">
        <table:table-column table:style-name="Table1.A"/>
        <table:table-column table:style-name="Table1.B"/>
        <table:table-header-rows>
          <table:table-row>
            <table:table-cell table:style-name="Table1.A1" office:value-type="string">
              <text:p text:style-name="Table_20_Heading">Career</text:p>
            </table:table-cell>
            <table:table-cell table:style-name="Table1.A1" office:value-type="string">
              <text:p text:style-name="Table_20_Heading">Required Skills</text:p>
            </table:table-cell>
          </table:table-row>
        </table:table-header-rows>
        <table:table-row>
          <table:table-cell table:style-name="Table1.A1" office:value-type="string">
            <text:p text:style-name="Table_20_Contents">Data Scientist</text:p>
          </table:table-cell>
          <table:table-cell table:style-name="Table1.A1" office:value-type="string">
            <text:p text:style-name="Table_20_Contents">Python, Machine Learning, SQL</text:p>
          </table:table-cell>
        </table:table-row>
        <table:table-row>
          <table:table-cell table:style-name="Table1.A1" office:value-type="string">
            <text:p text:style-name="Table_20_Contents">Web Developer</text:p>
          </table:table-cell>
          <table:table-cell table:style-name="Table1.A1" office:value-type="string">
            <text:p text:style-name="Table_20_Contents">HTML, CSS, JavaScript</text:p>
          </table:table-cell>
        </table:table-row>
        <table:table-row>
          <table:table-cell table:style-name="Table1.A1" office:value-type="string">
            <text:p text:style-name="Table_20_Contents">AI Engineer</text:p>
          </table:table-cell>
          <table:table-cell table:style-name="Table1.A1" office:value-type="string">
            <text:p text:style-name="Table_20_Contents">Python, Deep Learning</text:p>
          </table:table-cell>
        </table:table-row>
      </table:table>
      <text:p text:style-name="Horizontal_20_Line"/>
      <text:h text:style-name="Heading_20_1" text:outline-level="1">📈 <text:span text:style-name="Strong_20_Emphasis">9. SIMULATION MODULE</text:span></text:h>
      <text:p text:style-name="Text_20_body">The simulation module is a key feature of SkillOrbit.</text:p>
      <text:h text:style-name="Heading_20_3" text:outline-level="3"><text:soft-page-break/>It includes:</text:h>
      <text:list text:style-name="L19">
        <text:list-item>
          <text:p text:style-name="P36">📊 Salary growth trends (5-year simulation) </text:p>
        </text:list-item>
        <text:list-item>
          <text:p text:style-name="P36">📈 Job demand visualization </text:p>
        </text:list-item>
        <text:list-item>
          <text:p text:style-name="P36">📉 Competition level analysis </text:p>
        </text:list-item>
        <text:list-item>
          <text:p text:style-name="P37">⚠ Automation risk prediction </text:p>
        </text:list-item>
      </text:list>
      <text:h text:style-name="Heading_20_3" text:outline-level="3">Purpose:</text:h>
      <text:p text:style-name="Text_20_body">To simulate real-world industry behavior and help users understand future career outcomes.</text:p>
      <text:p text:style-name="Horizontal_20_Line"/>
      <text:h text:style-name="Heading_20_1" text:outline-level="1">🧪 <text:span text:style-name="Strong_20_Emphasis">10. SYSTEM IMPLEMENTATION</text:span></text:h>
      <text:h text:style-name="Heading_20_3" text:outline-level="3">Tools Used:</text:h>
      <text:list text:style-name="L20">
        <text:list-item>
          <text:p text:style-name="P38">Python </text:p>
        </text:list-item>
        <text:list-item>
          <text:p text:style-name="P38">Flask </text:p>
        </text:list-item>
        <text:list-item>
          <text:p text:style-name="P38">Scikit-learn </text:p>
        </text:list-item>
        <text:list-item>
          <text:p text:style-name="P38">Pandas </text:p>
        </text:list-item>
        <text:list-item>
          <text:p text:style-name="P38">HTML, CSS, JavaScript </text:p>
        </text:list-item>
        <text:list-item>
          <text:p text:style-name="P39">Chart.js </text:p>
        </text:list-item>
      </text:list>
      <text:h text:style-name="Heading_20_3" text:outline-level="3">Implementation Steps:</text:h>
      <text:list text:style-name="L21">
        <text:list-item>
          <text:p text:style-name="P40">Create dataset </text:p>
        </text:list-item>
        <text:list-item>
          <text:p text:style-name="P40">Train ML matching model </text:p>
        </text:list-item>
        <text:list-item>
          <text:p text:style-name="P40">Build Flask backend </text:p>
        </text:list-item>
        <text:list-item>
          <text:p text:style-name="P40">Develop frontend UI </text:p>
        </text:list-item>
        <text:list-item>
          <text:p text:style-name="P40">Integrate ML with system </text:p>
        </text:list-item>
        <text:list-item>
          <text:p text:style-name="P41">Add simulation charts </text:p>
        </text:list-item>
      </text:list>
      <text:p text:style-name="Horizontal_20_Line"/>
      <text:h text:style-name="Heading_20_1" text:outline-level="1">🖥️ <text:span text:style-name="Strong_20_Emphasis">11. USER INTERFACE MODULES</text:span></text:h>
      <text:list text:style-name="L22">
        <text:list-item>
          <text:p text:style-name="P42">Home Page </text:p>
        </text:list-item>
        <text:list-item>
          <text:p text:style-name="P42">Career Advisor Page </text:p>
        </text:list-item>
        <text:list-item>
          <text:p text:style-name="P42">Resume Upload Page </text:p>
        </text:list-item>
        <text:list-item>
          <text:p text:style-name="P42">Results Dashboard </text:p>
        </text:list-item>
        <text:list-item>
          <text:p text:style-name="P42">Simulation Dashboard </text:p>
        </text:list-item>
        <text:list-item>
          <text:p text:style-name="P43">Career Roadmap Page </text:p>
        </text:list-item>
      </text:list>
      <text:p text:style-name="Horizontal_20_Line"/>
      <text:h text:style-name="Heading_20_1" text:outline-level="1"><text:soft-page-break/>📊 <text:span text:style-name="Strong_20_Emphasis">12. SAMPLE OUTPUT</text:span></text:h>
      <text:h text:style-name="Heading_20_3" text:outline-level="3">Input:</text:h>
      <text:p text:style-name="Text_20_body">Skills: Python, SQL</text:p>
      <text:h text:style-name="Heading_20_3" text:outline-level="3">Output:</text:h>
      <text:list text:style-name="L23">
        <text:list-item>
          <text:p text:style-name="P44">Data Analyst (85% match) </text:p>
        </text:list-item>
        <text:list-item>
          <text:p text:style-name="P44">Backend Developer (75% match) </text:p>
        </text:list-item>
        <text:list-item>
          <text:p text:style-name="P45">Business Analyst (70% match) </text:p>
        </text:list-item>
      </text:list>
      <text:h text:style-name="Heading_20_3" text:outline-level="3">Skill Gap:</text:h>
      <text:list text:style-name="L24">
        <text:list-item>
          <text:p text:style-name="P46">Pandas (Missing) </text:p>
        </text:list-item>
        <text:list-item>
          <text:p text:style-name="P47">Data Visualization (Missing) </text:p>
        </text:list-item>
      </text:list>
      <text:p text:style-name="Horizontal_20_Line"/>
      <text:h text:style-name="Heading_20_1" text:outline-level="1">🔐 <text:span text:style-name="Strong_20_Emphasis">13. FUTURE ENHANCEMENTS</text:span></text:h>
      <text:list text:style-name="L25">
        <text:list-item>
          <text:p text:style-name="P48">Integration with real job APIs (LinkedIn, Indeed) </text:p>
        </text:list-item>
        <text:list-item>
          <text:p text:style-name="P48">Advanced deep learning models </text:p>
        </text:list-item>
        <text:list-item>
          <text:p text:style-name="P48">AI chatbot career mentor </text:p>
        </text:list-item>
        <text:list-item>
          <text:p text:style-name="P48">Mobile application version </text:p>
        </text:list-item>
        <text:list-item>
          <text:p text:style-name="P49">Resume scoring system improvement </text:p>
        </text:list-item>
      </text:list>
      <text:p text:style-name="Horizontal_20_Line"/>
      <text:h text:style-name="Heading_20_1" text:outline-level="1">🏁 <text:span text:style-name="Strong_20_Emphasis">14. CONCLUSION</text:span></text:h>
      <text:p text:style-name="Text_20_body">SkillOrbit is an intelligent career guidance system that effectively uses Machine Learning and simulation techniques to help users make better career decisions. It provides personalized recommendations, resume analysis, and visual insights into career growth and market trends.</text:p>
      <text:p text:style-name="Text_20_body">The system successfully bridges the gap between academic learning and real-world industry requirements.</text:p>
      <text:p text:style-name="Horizontal_20_Line"/>
      <text:h text:style-name="Heading_20_1" text:outline-level="1">📚 <text:span text:style-name="Strong_20_Emphasis">15. REFERENCES</text:span></text:h>
      <text:list text:style-name="L26">
        <text:list-item>
          <text:p text:style-name="P50">Scikit-learn Documentation </text:p>
        </text:list-item>
        <text:list-item>
          <text:p text:style-name="P50">Python Official Documentation </text:p>
        </text:list-item>
        <text:list-item>
          <text:p text:style-name="P50">NLP Research Papers </text:p>
        </text:list-item>
        <text:list-item>
          <text:p text:style-name="P50">Chart.js Library Documentation </text:p>
        </text:list-item>
        <text:list-item>
          <text:p text:style-name="P51"><text:soft-page-break/>Career recommendation system studi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13:58:55.514816400</meta:creation-date>
    <dc:date>2026-05-25T13:59:08.926089300</dc:date>
    <meta:editing-duration>PT14S</meta:editing-duration>
    <meta:editing-cycles>1</meta:editing-cycles>
    <meta:document-statistic meta:table-count="1" meta:image-count="0" meta:object-count="0" meta:page-count="7" meta:paragraph-count="155" meta:word-count="837" meta:character-count="5357" meta:non-whitespace-character-count="4676"/>
    <meta:generator>LibreOffice/25.8.6.2$Windows_X86_64 LibreOffice_project/b4b39682cd9868fa725bc664aff94278d315bd04</meta:generator>
  </office:meta>
</office:document-meta>
</file>